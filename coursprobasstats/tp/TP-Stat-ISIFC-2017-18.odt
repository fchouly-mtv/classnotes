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mily-generic="swiss"/>
    <style:font-face style:name="Monaco" svg:font-family="Monaco" style:font-family-generic="modern" style:font-pitch="fixed"/>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P1" style:family="paragraph" style:parent-style-name="Standard">
      <style:paragraph-properties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61699" style:font-name="Monaco" fo:font-size="9pt" style:font-name-asian="Monaco" style:font-size-asian="9pt" style:font-name-complex="Monaco" style:font-size-complex="9pt"/>
    </style:style>
    <style:style style:name="P2" style:family="paragraph" style:parent-style-name="Standard">
      <style:paragraph-properties fo:text-align="center"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normal" style:text-underline-style="solid" style:text-underline-width="auto" style:text-underline-color="font-color" fo:font-weight="bold" style:font-size-asian="9pt" style:font-size-complex="9pt" style:font-weight-complex="bold"/>
    </style:style>
    <style:style style:name="P3" style:family="paragraph" style:parent-style-name="Standard">
      <style:paragraph-properties fo:text-align="center"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fo:font-weight="bold" style:font-size-asian="9pt" style:font-size-complex="9pt" style:font-weight-complex="bold"/>
    </style:style>
    <style:style style:name="P4"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fo:font-weight="bold" style:font-size-asian="9pt" style:font-size-complex="9pt" style:font-weight-complex="bold"/>
    </style:style>
    <style:style style:name="P5"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fo:font-weight="bold" style:font-size-asian="9pt" style:font-size-complex="9pt"/>
    </style:style>
    <style:style style:name="P6"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fo:font-weight="bold" style:font-size-asian="9pt" style:font-weight-asian="bold" style:font-size-complex="9pt" style:font-weight-complex="bold"/>
    </style:style>
    <style:style style:name="P7"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style:font-size-asian="9pt" style:font-size-complex="9pt"/>
    </style:style>
    <style:style style:name="P8"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font-size-asian="9pt" style:font-size-complex="9pt"/>
    </style:style>
    <style:style style:name="P9"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officeooo:paragraph-rsid="0019a9d0" style:font-size-asian="9pt" style:font-size-complex="9pt"/>
    </style:style>
    <style:style style:name="P10"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officeooo:paragraph-rsid="001ed7f2" style:font-size-asian="9pt" style:font-size-complex="9pt"/>
    </style:style>
    <style:style style:name="P11" style:family="paragraph" style:parent-style-name="Standard">
      <style:paragraph-properties fo:text-align="justify"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font-size-asian="9pt" style:font-size-complex="9pt"/>
    </style:style>
    <style:style style:name="P12" style:family="paragraph" style:parent-style-name="Standard">
      <style:paragraph-properties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9pt" style:font-size-asian="9pt" style:font-size-complex="9pt"/>
    </style:style>
    <style:style style:name="P13" style:family="paragraph" style:parent-style-name="Standard">
      <style:paragraph-properties fo:text-align="center"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font-size-asian="9pt" style:font-size-complex="9pt"/>
    </style:style>
    <style:style style:name="P14"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font-size-asian="9pt" style:font-style-asian="italic" style:font-size-complex="9pt" style:font-style-complex="italic"/>
    </style:style>
    <style:style style:name="P15" style:family="paragraph" style:parent-style-name="Standard">
      <style:paragraph-properties fo:text-align="justify"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font-size-asian="9pt" style:font-style-asian="italic" style:font-size-complex="9pt" style:font-style-complex="italic"/>
    </style:style>
    <style:style style:name="P16" style:family="paragraph" style:parent-style-name="Standard">
      <style:paragraph-properties fo:text-align="center" style:justify-single-word="false"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font-size-asian="9pt" style:font-style-asian="italic" style:font-size-complex="9pt" style:font-style-complex="italic"/>
    </style:style>
    <style:style style:name="P17"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font-size-asian="9pt" style:font-size-complex="9pt" style:font-style-complex="italic"/>
    </style:style>
    <style:style style:name="P18"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text-underline-style="solid" style:text-underline-width="auto" style:text-underline-color="font-color" style:font-size-asian="9pt" style:font-size-complex="9pt" style:font-style-complex="italic"/>
    </style:style>
    <style:style style:name="P19"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20"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italic" style:text-underline-style="none" fo:font-weight="bold" style:font-size-asian="9pt" style:font-style-asian="italic" style:font-weight-asian="bold" style:font-size-complex="9pt" style:font-style-complex="italic" style:font-weight-complex="bold"/>
    </style:style>
    <style:style style:name="P21"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weight="bold" style:font-size-asian="9pt" style:font-weight-asian="bold" style:font-size-complex="9pt" style:font-weight-complex="bold"/>
    </style:style>
    <style:style style:name="P22"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none" fo:font-weight="normal" style:font-size-asian="9pt" style:font-weight-asian="normal" style:font-size-complex="9pt" style:font-weight-complex="normal"/>
    </style:style>
    <style:style style:name="P23" style:family="paragraph" style:parent-style-name="Standard" style:master-page-name="">
      <style:paragraph-properties style:page-number="auto"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font-size-asian="9pt" style:font-size-complex="9pt"/>
    </style:style>
    <style:style style:name="P24" style:family="paragraph" style:parent-style-name="Standard" style:master-page-name="Standard">
      <style:paragraph-properties fo:text-align="center" style:justify-single-word="false" style:page-number="auto"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fo:font-style="normal" style:text-underline-style="solid" style:text-underline-width="auto" style:text-underline-color="font-color" fo:font-weight="bold" style:font-size-asian="9pt" style:font-size-complex="9pt" style:font-weight-complex="bold"/>
    </style:style>
    <style:style style:name="P25"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8pt" officeooo:paragraph-rsid="001ed7f2" style:font-size-asian="8pt" style:font-size-complex="8pt"/>
    </style:style>
    <style:style style:name="P26" style:family="paragraph" style:parent-style-name="Standard">
      <style:paragraph-properties style:writing-mode="lr-tb">
        <style:tab-stops>
          <style:tab-stop style:position="0.997cm"/>
          <style:tab-stop style:position="1.998cm"/>
          <style:tab-stop style:position="2.999cm"/>
          <style:tab-stop style:position="3.997cm"/>
          <style:tab-stop style:position="4.997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text-underline-style="solid" style:text-underline-width="auto" style:text-underline-color="font-color" fo:font-weight="bold" style:font-size-asian="9pt" style:font-size-complex="9pt" style:font-weight-complex="bold"/>
    </style:style>
    <style:style style:name="T1" style:family="text">
      <style:text-properties fo:font-style="italic" style:text-underline-style="solid" style:text-underline-width="auto" style:text-underline-color="font-color" style:font-style-complex="italic"/>
    </style:style>
    <style:style style:name="T2" style:family="text">
      <style:text-properties fo:font-style="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Monaco" style:font-name-complex="Monaco"/>
    </style:style>
    <style:style style:name="T5" style:family="text">
      <style:text-properties fo:color="#061699" style:font-name="Monaco" style:font-name-complex="Monaco"/>
    </style:style>
    <style:style style:name="T6" style:family="text">
      <style:text-properties fo:color="#c38809" style:font-name="Monaco" style:font-name-complex="Monaco"/>
    </style:style>
    <style:style style:name="T7" style:family="text">
      <style:text-properties fo:color="#055218" style:font-name="Monaco" style:font-name-complex="Monaco"/>
    </style:style>
    <style:style style:name="T8" style:family="text">
      <style:text-properties fo:font-style="normal" style:font-style-asian="normal" style:font-style-complex="normal"/>
    </style:style>
    <style:style style:name="T9" style:family="text">
      <style:text-properties officeooo:rsid="0019a9d0"/>
    </style:style>
    <style:style style:name="T10" style:family="text">
      <style:text-properties officeooo:rsid="001ed7f2"/>
    </style:style>
    <style:style style:name="T11" style:family="text">
      <style:text-properties fo:font-size="8pt" style:font-size-asian="8pt" style:font-size-complex="8pt"/>
    </style:style>
    <style:style style:name="T12" style:family="text">
      <style:text-properties fo:font-size="8pt" officeooo:rsid="001fa1c2" style:font-size-asian="8pt" style:font-size-complex="8pt"/>
    </style:style>
    <style:style style:name="T13" style:family="text">
      <style:text-properties officeooo:rsid="001f9716"/>
    </style:style>
    <style:style style:name="T14" style:family="text">
      <style:text-properties officeooo:rsid="0020f4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TP Statistique 201<text:span text:style-name="T14">7</text:span>/201<text:span text:style-name="T14">8</text:span>. ISIFC 2A.</text:p>
      <text:p text:style-name="P3">Introduction au logiciel "R"</text:p>
      <text:p text:style-name="P14"/>
      <text:p text:style-name="P15">Le TP dure 4h et vous êtes invités à le faire en binôme. On ne vous demande pas de compte-rendu, mais prenez des notes qui pourront vous servir ultérieurement. Lisez bien l'énoncé car vous y trouverez beaucoup d'indications.</text:p>
      <text:p text:style-name="P8"/>
      <text:p text:style-name="P11">Le logiciel "R" de traitement statistique de données est basé sur un langage fonctionnel et interprété. Il est proche de Matlab<text:span text:style-name="T8">™</text:span> dans son utilisation. A la différence de Matlab<text:span text:style-name="T8">™</text:span>, il est uniquement dédié à la statistique. C'est de plus un logiciel libre que vous pouvez récupérer ici :</text:p>
      <text:p text:style-name="P11"/>
      <text:p text:style-name="P16"><text:a xlink:type="simple" xlink:href="http://www.r-project.org/" text:style-name="Internet_20_link" text:visited-style-name="Visited_20_Internet_20_Link"><text:span text:style-name="T8">http://www.r-project.org/</text:span></text:a> </text:p>
      <text:p text:style-name="P14"/>
      <text:p text:style-name="P4">1. Prise en main de "R".</text:p>
      <text:p text:style-name="P8"/>
      <text:p text:style-name="P6">1.1. L'environnement de travail.</text:p>
      <text:p text:style-name="P21"/>
      <text:p text:style-name="P8">Pour démarrer "R", cliquer sur l'icône correspondante. Pour quitter "R", il suffit de taper :</text:p>
      <text:p text:style-name="P8"/>
      <text:p text:style-name="P8">&gt; q()</text:p>
      <text:p text:style-name="P8"/>
      <text:p text:style-name="P11"><text:span text:style-name="T1">Attention :</text:span><text:span text:style-name="T2"> R crée un répertoire .RData et un fichier .Rhistory dans le répertoire courant. Il est conseillé de démarrer "R" depuis un nouveau répertoire de travail ("TPStat" par exemple). Pour ce faire, aller dans "Fichier" puis "Changer le répertoire courant".</text:span></text:p>
      <text:p text:style-name="P8"/>
      <text:p text:style-name="P8">Pour avoir de l'aide :</text:p>
      <text:p text:style-name="P8"/>
      <text:p text:style-name="P8">&gt; help.start()</text:p>
      <text:p text:style-name="P8"/>
      <text:p text:style-name="P8">Cette commande ouvre une fenêtre où vous avez accès à toute la documentation pertinente concernant le logiciel.</text:p>
      <text:p text:style-name="P8"/>
      <text:p text:style-name="P6">1.2. Les commandes élémentaires.</text:p>
      <text:p text:style-name="P6"/>
      <text:p text:style-name="P11">Dans l'interface du logiciel, vous avez accès à une fenêtre qui vous permet d'entrer interactivement des commandes et qui vous affiche les résultats. Les commandes élémentaires sont des expressions comme par exemple :</text:p>
      <text:p text:style-name="P8"/>
      <text:p text:style-name="P8">&gt; 3 + 4</text:p>
      <text:p text:style-name="P8"/>
      <text:p text:style-name="P11">La structure de données élémentaire, comme pour Matlab<text:span text:style-name="T8">™</text:span>, est le vecteur. La syntaxe change par contre par rapport à Matlab<text:span text:style-name="T8">™</text:span><text:span text:style-name="T2">.</text:span> Pour définir un vecteur "a" qui contient pour valeurs " [ 3 5 7 11 ] ", on procède comme suit :</text:p>
      <text:p text:style-name="P8"/>
      <text:p text:style-name="P8">&gt; a &lt;- c(3,5,7,11)</text:p>
      <text:p text:style-name="P8"/>
      <text:p text:style-name="P18">Notez l'instruction d'affectation, qui est "&lt;-".</text:p>
      <text:p text:style-name="P8"/>
      <text:p text:style-name="P8">Pour savoir ce que contient la variable "a" :</text:p>
      <text:p text:style-name="P8"/>
      <text:p text:style-name="P8">&gt; a</text:p>
      <text:p text:style-name="P19"/>
      <text:p text:style-name="P8"><text:span text:style-name="T3">Exercice 1.</text:span> Quels résultats obtenez-vous avec les commandes suivantes ?</text:p>
      <text:p text:style-name="P8">&gt; a[2]</text:p>
      <text:p text:style-name="P8">&gt; a[1:3]</text:p>
      <text:p text:style-name="P9">&gt; a[a&gt;5]</text:p>
      <text:p text:style-name="P9">----------------</text:p>
      <text:p text:style-name="P8"><text:soft-page-break/></text:p>
      <text:p text:style-name="P11">Outre l'utilisation interactive, vous pouvez aussi entrez des commandes dans des scripts (c'est ce que l'on vous conseille). Pour créer un script : "Fichier" -&gt; "Nouveau Script". Lorsque vous enregistrez le script, il est sauvé par défaut dans votre répertoire courant. N'oubliez pas l'extension ".R". Pour charger le script en mémoire :</text:p>
      <text:p text:style-name="P8"/>
      <text:p text:style-name="P8">&gt; source("nom_script.R")</text:p>
      <text:p text:style-name="P8"/>
      <text:p text:style-name="P8"><text:span text:style-name="T3">Exercice 2. </text:span>On peut aussi créer ses propres fonctions. Créer un script qui contient la fonction suivante :</text:p>
      <text:p text:style-name="P8"/>
      <text:p text:style-name="P12"><text:span text:style-name="T4">stat.log</text:span><text:span text:style-name="T5"> &lt;- </text:span><text:span text:style-name="T6">function</text:span><text:span text:style-name="T5">(</text:span><text:span text:style-name="T4">x</text:span><text:span text:style-name="T5">)</text:span></text:p>
      <text:p text:style-name="P1">{</text:p>
      <text:p text:style-name="P12"><text:span text:style-name="T4">n</text:span><text:span text:style-name="T5"> &lt;- </text:span><text:span text:style-name="T4">length</text:span><text:span text:style-name="T5">(</text:span><text:span text:style-name="T4">x</text:span><text:span text:style-name="T5">)</text:span></text:p>
      <text:p text:style-name="P12"><text:span text:style-name="T4">s</text:span><text:span text:style-name="T5"> &lt;- </text:span><text:span text:style-name="T7">0</text:span></text:p>
      <text:p text:style-name="P12"><text:span text:style-name="T6">for</text:span><text:span text:style-name="T5"> (</text:span><text:span text:style-name="T4">i</text:span><text:span text:style-name="T5"> </text:span><text:span text:style-name="T6">in</text:span><text:span text:style-name="T5"> (</text:span><text:span text:style-name="T7">1</text:span><text:span text:style-name="T5">:</text:span><text:span text:style-name="T4">n</text:span><text:span text:style-name="T5">)) { </text:span><text:span text:style-name="T4">s</text:span><text:span text:style-name="T5"> &lt;- </text:span><text:span text:style-name="T4">s</text:span><text:span text:style-name="T5"> + </text:span><text:span text:style-name="T4">log</text:span><text:span text:style-name="T5">(</text:span><text:span text:style-name="T4">x</text:span><text:span text:style-name="T5">[</text:span><text:span text:style-name="T4">i</text:span><text:span text:style-name="T5">]) }</text:span></text:p>
      <text:p text:style-name="P12"><text:span text:style-name="T5">-</text:span><text:span text:style-name="T4">s</text:span><text:span text:style-name="T5">/</text:span><text:span text:style-name="T4">n</text:span><text:span text:style-name="T5"><text:tab/></text:span></text:p>
      <text:p text:style-name="P1">}</text:p>
      <text:p text:style-name="P8"/>
      <text:p text:style-name="P8">"stat.log" est le nom de la fonction, "x" est le paramètre, "-s/n" est la valeur renvoyée par la fonction. Essayez cette fonction avec le vecteur "a" précédemment crée. Quel indicateur statistique vous renvoie cette fonction ?</text:p>
      <text:p text:style-name="P8">----------------</text:p>
      <text:p text:style-name="P7"/>
      <text:p text:style-name="P17">Note : utilisez # pour mettre des commentaires dans les fonctions.</text:p>
      <text:p text:style-name="P7"/>
      <text:p text:style-name="P6">2. Génération de données aléatoires.</text:p>
      <text:p text:style-name="P8"/>
      <text:p text:style-name="P8">Pour entrer un échantillon statistique à la main :</text:p>
      <text:p text:style-name="P8"/>
      <text:p text:style-name="P8">&gt; echantillon &lt;- c( x1, x2, ... xn ) </text:p>
      <text:p text:style-name="P8"/>
      <text:p text:style-name="P11">Vous pouvez aussi générer un échantillon aléatoire via R. Par exemple, pour générer un échantillon de 7 réels qui suivent la loi normale de moyenne 4 et de variance 3 :</text:p>
      <text:p text:style-name="P8"/>
      <text:p text:style-name="P8">&gt; echantillon &lt;- rnorm ( 7, 4 , 3 )</text:p>
      <text:p text:style-name="P8"/>
      <text:p text:style-name="P8"><text:span text:style-name="T3">Exercice 3.</text:span> Générez 9 échantillons de tailles différentes :</text:p>
      <text:p text:style-name="P8">a - avec la loi normale centrée réduite (tailles n=10,50,500),</text:p>
      <text:p text:style-name="P8">b - avec la loi exponentielle de paramètre lambda=0.1 (tailles n=10,50,500),</text:p>
      <text:p text:style-name="P8">c - avec la loi uniforme sur l'intervalle (0,1) (tailles n=10,50,500).</text:p>
      <text:p text:style-name="P8">Gardez bien les échantillons obtenus. Ils serviront par la suite.</text:p>
      <text:p text:style-name="P8">-------------------</text:p>
      <text:p text:style-name="P8"/>
      <text:p text:style-name="P11"><text:span text:style-name="T1">Remarque :</text:span><text:span text:style-name="T2"> il est bien sûr possible d'importer des échantillons statistiques de "grande taille" provenant par exemple d'un fichier texte ou Excel™. Néanmoins, c'est un peu plus acrobatique qu'il n'y paraît. La documentation de "R" contient quelques pistes, que vous pourrez explorer chez vous si vous le souhaitez.</text:span></text:p>
      <text:p text:style-name="P8"/>
      <text:p text:style-name="P4">3. Représentation graphique de données.</text:p>
      <text:p text:style-name="P8"/>
      <text:p text:style-name="P4">3.1. Données discrètes.</text:p>
      <text:p text:style-name="P8"/>
      <text:p text:style-name="P10">On reporte ici la consommation en <text:span text:style-name="T13">décembre </text:span>201<text:span text:style-name="T13">5</text:span> de produits régionaux en Franche-Comté, en kilogrammes (ou en litres) par foyer :</text:p>
      <text:p text:style-name="P10"/>
      <text:p text:style-name="P10"><text:span text:style-name="T11"><text:tab/>Cancoillotte<text:tab/><text:tab/><text:tab/>1950<text:tab/>Saucisse de Morteau<text:tab/><text:tab/></text:span><text:span text:style-name="T12">9</text:span><text:span text:style-name="T11">20</text:span></text:p>
      <text:p text:style-name="P25"><text:tab/>Saucisse de Montbéliard<text:tab/>470<text:tab/>Mont d'or<text:tab/><text:tab/><text:tab/>750</text:p>
      <text:p text:style-name="P10"><text:span text:style-name="T11"><text:tab/>Edel de Clairon<text:tab/><text:tab/><text:tab/></text:span><text:span text:style-name="T12">6</text:span><text:span text:style-name="T11">70<text:tab/>Vin jaune<text:tab/><text:tab/><text:tab/>715</text:span></text:p>
      <text:p text:style-name="P13"><text:soft-page-break/></text:p>
      <text:p text:style-name="P8"><text:span text:style-name="T3">Exercice 4.</text:span> Représentez ces données à l'aide d'un diagramme sectoriel. La commande pour tracer un tel diagramme est :</text:p>
      <text:p text:style-name="P8"/>
      <text:p text:style-name="P8">&gt; pie ( x , labels = produits )</text:p>
      <text:p text:style-name="P8"/>
      <text:p text:style-name="P8">où la variable x contient les quantités et la variable "produits" contient les noms (entre guillemets).</text:p>
      <text:p text:style-name="P8">--------------------</text:p>
      <text:p text:style-name="P8"/>
      <text:p text:style-name="P8"><text:span text:style-name="T3">Exercice 5.</text:span> Tracez aussi le diagramme à colonnes correspondant :</text:p>
      <text:p text:style-name="P8"/>
      <text:p text:style-name="P8">&gt; barplot( x , names = produits )</text:p>
      <text:p text:style-name="P8">---------------------</text:p>
      <text:p text:style-name="P8"/>
      <text:p text:style-name="P8"><text:span text:style-name="T3">Exercice 6. </text:span><text:s/>Reprenez l'exemple <text:s/>:</text:p>
      <text:p text:style-name="P8"/>
      <text:p text:style-name="P8">Nombre d'enfants <text:tab/>0<text:tab/>1<text:tab/>2<text:tab/>3<text:tab/>4<text:tab/>5<text:tab/>6<text:tab/>&gt;6</text:p>
      <text:p text:style-name="P8">Fréquence absolue<text:tab/>235<text:tab/>183<text:tab/>285<text:tab/>139<text:tab/>88<text:tab/>67<text:tab/>3<text:tab/>0</text:p>
      <text:p text:style-name="P8"/>
      <text:p text:style-name="P8">Tracez le diagramme en bâtons associé.</text:p>
      <text:p text:style-name="P8">----------------------</text:p>
      <text:p text:style-name="P8"/>
      <text:p text:style-name="P4">3.2. Variables continues et histogramme.</text:p>
      <text:p text:style-name="P8"/>
      <text:p text:style-name="P8">On reprend les données sur la durée de vie des dispositifs électroniques :</text:p>
      <text:p text:style-name="P8"/>
      <text:p text:style-name="P8">91.6 <text:s/>35.7 <text:s/>251.3 <text:s/>24.3 <text:s/>5.4 <text:s/>67.3 <text:s/>170.9 <text:s/>9.5 <text:s/>118.4 <text:s/>57.1</text:p>
      <text:p text:style-name="P8"/>
      <text:p text:style-name="P19">Exercice 7.</text:p>
      <text:p text:style-name="P8">1. Ordonnez l'échantillon (en utilisant la commande "sort").</text:p>
      <text:p text:style-name="P8"/>
      <text:p text:style-name="P8">2. Représentez ces données à l'aide d'un histogramme à pas fixe. Indication :</text:p>
      <text:p text:style-name="P8"/>
      <text:p text:style-name="P8">&gt; hist ( x , prob=T , breaks = seq( ... , ... , ... ) )</text:p>
      <text:p text:style-name="P8"/>
      <text:p text:style-name="P8">Quels sont les paramètres de cette commande ? Comment utilise-t'on "breaks" et "seq" ? Que fait la commande "prob" ?</text:p>
      <text:p text:style-name="P8"/>
      <text:p text:style-name="P8">3. Faites de même avec un histogramme à pas variable (comment faire ici ??).</text:p>
      <text:p text:style-name="P8"/>
      <text:p text:style-name="P8">4. Tracez le polygone des fréquences. Utilisez la commande "hist" judicieusement pour récupérer les valeurs pertinentes pour le tracé. Pour afficher une ligne brisée, vous disposez de la commande :</text:p>
      <text:p text:style-name="P8"/>
      <text:p text:style-name="P8">&gt; lines ( abs , ord , options );</text:p>
      <text:p text:style-name="P8">------------------------------</text:p>
      <text:p text:style-name="P20"/>
      <text:p text:style-name="P20">Exercice 8.</text:p>
      <text:p text:style-name="P22">Tracez les histogrammes associés aux échantillons obtenus dans l'exercice 3. Sauvez les résultats obtenus.</text:p>
      <text:p text:style-name="P22">-------------------</text:p>
      <text:p text:style-name="P4"/>
      <text:p text:style-name="P4"/>
      <text:p text:style-name="P4"/>
      <text:p text:style-name="P4"/>
      <text:p text:style-name="P4"/>
      <text:p text:style-name="P4"><text:soft-page-break/>4. Calcul d'indicateurs.</text:p>
      <text:p text:style-name="P8"/>
      <text:p text:style-name="P8">Un logiciel comme "R" est bien sûr capable de calculer les indicateurs les plus courants pour un échantillon donné :</text:p>
      <text:p text:style-name="P8"/>
      <text:p text:style-name="P8">&gt; mean(x) </text:p>
      <text:p text:style-name="P8">&gt; var(x)</text:p>
      <text:p text:style-name="P8">&gt; median(x)</text:p>
      <text:p text:style-name="P8">&gt; quantile(x,p/q)</text:p>
      <text:p text:style-name="P8">...</text:p>
      <text:p text:style-name="P8"/>
      <text:p text:style-name="P20">Exercice 9.</text:p>
      <text:p text:style-name="P8">1. Que font les commandes ci-dessus ? Expliquez en particulier les commande "median" et "quantile".</text:p>
      <text:p text:style-name="P8"/>
      <text:p text:style-name="P8">2. Appliquer ces commandes aux échantillons générés à l'exercice 3.</text:p>
      <text:p text:style-name="P8"/>
      <text:p text:style-name="P8">3. Que fait la commande "summary" ?</text:p>
      <text:p text:style-name="P8"/>
      <text:p text:style-name="P8">4. Que remarquez-vous concernant la commande "var" ? (faites le calcul à la main pour comparer...)</text:p>
      <text:p text:style-name="P8"/>
      <text:p text:style-name="P8">5. Que remarquez-vous lorsque vous faites varier la taille de l'échantillon ?</text:p>
      <text:p text:style-name="P8">-----------------</text:p>
      <text:p text:style-name="P8"/>
      <text:p text:style-name="P4">5. Régression linéaire.</text:p>
      <text:p text:style-name="P8"/>
      <text:p text:style-name="P20">Exercice 10.</text:p>
      <text:p text:style-name="P8">1. D'abord, générer un jeu de données (x,y) qui vous serve ensuite à effectuer une régression linéaire. On pourra utiliser ce qui suit :</text:p>
      <text:p text:style-name="P8"/>
      <text:p text:style-name="P8">&gt; x &lt;- seq(0,10,1)</text:p>
      <text:p text:style-name="P8">&gt; y &lt;- -4*x + 1 + rnorm(length(x),0,val);</text:p>
      <text:p text:style-name="P8"/>
      <text:p text:style-name="P8">où "val" est la valeur du bruit sur les données : essayez un bruit faible, moyen et fort pour comparer.</text:p>
      <text:p text:style-name="P8"/>
      <text:p text:style-name="P8">2. Commencez par visualiser les données, en faisant par exemple :</text:p>
      <text:p text:style-name="P8"/>
      <text:p text:style-name="P8">&gt; plot ( x , y )</text:p>
      <text:p text:style-name="P8"/>
      <text:p text:style-name="P8">3. Faire une régression linéaire sur les 3 jeux de données (bruit faible, moyen et fort). Faites le d'abord "manuellement" à l'aide des formules du cours et des commandes "cov" et "cor". Ensuite, regardez comment faire avec la commande "lm" de R.</text:p>
      <text:p text:style-name="P8"/>
      <text:p text:style-name="P8">4. Evaluez la qualité de votre régression dans chacune des 3 situations (bruit faible, moyen et fort). Pour cela, calculez le coefficient de corrélation empirique et l'erreur quadratique minimale. </text:p>
      <text:p text:style-name="P23">-----------------------</text:p>
      <text:p text:style-name="P8"><text:s/></text:p>
      <text:p text:style-name="P5">6. Bonus.</text:p>
      <text:p text:style-name="P8"/>
      <text:p text:style-name="P20">Exercice 11.</text:p>
      <text:p text:style-name="P8">Que f<text:span text:style-name="T9">ont les</text:span> commande<text:span text:style-name="T9">s</text:span> :</text:p>
      <text:p text:style-name="P8">&gt; lines(density(ech)) ?</text:p>
      <text:p text:style-name="P9">&gt; ecdf(ech) ?</text:p>
      <text:p text:style-name="P8">avec "ech" un échantillon.</text:p>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tyle:font-family-generic="swiss"/>
    <style:font-face style:name="Monaco" svg:font-family="Monaco" style:font-family-generic="modern" style:font-pitch="fixed"/>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Helvetica" fo:font-size="12pt" fo:language="fr" fo:country="FR" style:font-name-asian="Helvetica" style:font-size-asian="10.5pt" style:language-asian="zh" style:country-asian="CN" style:font-name-complex="Helvetica"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fr" fo:country="FR" style:font-name-asian="Helvetica"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family="Helvetica, Arial" style:font-family-generic="swiss" fo:font-size="12pt" fo:language="fr" fo:country="FR" style:font-name-asian="Helvetica" style:font-family-asian="Helvetica, Arial" style:font-family-generic-asian="swiss" style:language-asian="zh" style:country-asian="CN" style:font-name-complex="Helvetica" style:font-family-complex="Helvetica, Arial" style:font-family-generic-complex="swis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family-generic-asian="swiss" style:font-pitch-asian="variable"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loext:contextual-spacing="false"/>
      <style:text-properties fo:font-style="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046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2T12:41:03.972451533</dc:date>
    <meta:editing-duration>PT45M20S</meta:editing-duration>
    <meta:editing-cycles>21</meta:editing-cycles>
    <meta:document-statistic meta:table-count="0" meta:image-count="0" meta:object-count="0" meta:page-count="4" meta:paragraph-count="117" meta:word-count="1186" meta:character-count="7158" meta:non-whitespace-character-count="6058"/>
  </office:meta>
</office:document-meta>
</file>