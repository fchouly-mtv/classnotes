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0000000249F218DB083C79103D.png" manifest:media-type="image/png"/>
  <manifest:file-entry manifest:full-path="Pictures/10000000000002000000024B9B7745F4B8E53DD8.png" manifest:media-type="image/png"/>
  <manifest:file-entry manifest:full-path="Pictures/10000000000002E9000002A855B960FE9CF5928A.jpg" manifest:media-type="image/jpeg"/>
  <manifest:file-entry manifest:full-path="Pictures/10000201000007FB000004796B62CE8AC33FF88E.png" manifest:media-type="image/png"/>
  <manifest:file-entry manifest:full-path="Pictures/10000000000001F3000002BF5F86BFDF674001EC.png" manifest:media-type="image/png"/>
  <manifest:file-entry manifest:full-path="Pictures/100002010000012C00000112B76350759931D1ED.png" manifest:media-type="image/png"/>
  <manifest:file-entry manifest:full-path="Pictures/10000000000002E9000002A935DA809BA94CC1E9.jpg" manifest:media-type="image/jpeg"/>
  <manifest:file-entry manifest:full-path="Pictures/10000201000007CD000004E2FF49BF1E6093BA52.png" manifest:media-type="image/png"/>
  <manifest:file-entry manifest:full-path="Pictures/100002010000012C000001121952385705DF6E3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alcul Scientifique 2</text:span><text:span text:style-name="T1"><text:line-break/></text:span><text:span text:style-name="T1">Eléments Fini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IGS2</text:span></text:p>
            <text:p text:style-name="P1"><text:span text:style-name="T3"><text:a xlink:href="mailto:franz.chouly@u-bourgogne.fr" xlink:type="simple">franz.chouly@u-bourgogne.fr</text:a>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 et principe&#10;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otivation et principe</text:span><text:span text:style-name="T4"><text:line-break/></text:span><text:span text:style-name="T4"/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5">But :</text:span><text:span text:style-name="T6"> simulation d’un processus physique, pour prévoir et optimiser le comportement d’une pièce mécanique, d’un composant, etc.</text:span></text:p>
            <text:p text:style-name="P8"><text:span text:style-name="T6">→ </text:span><text:span text:style-name="T6">résolution d’une EDP (qui intègre des lois physiques) + conditions de bord / init.</text:span></text:p>
            <text:p text:style-name="P8"><text:span text:style-name="T6"/></text:p>
            <text:p text:style-name="P8"><text:span text:style-name="T5">1re étape :</text:span><text:span text:style-name="T6"> définition et maillage du domaine </text:span></text:p>
            <text:p text:style-name="P8"><text:span text:style-name="T6">→ </text:span><text:span text:style-name="T6">nombre fini d’inconnues (problème matriciel).</text:span></text:p>
            <text:p text:style-name="P8"><text:span text:style-name="T6"/></text:p>
            <text:p text:style-name="P9"><text:span text:style-name="T7"><text:a xlink:href="https://en.wikipedia.org/wiki/Finite_element_method" xlink:type="simple">https://en.wikipedia.org/wiki/Finite_element_method</text:a></text:span></text:p>
          </draw:text-box>
        </draw:frame>
        <draw:frame draw:name="Google Shape;62;p14" draw:style-name="gr2" draw:text-style-name="P11" draw:layer="layout" svg:width="6.616cm" svg:height="6.042cm" svg:x="16.702cm" svg:y="7.144cm">
          <draw:image xlink:href="Pictures/100002010000012C000001121952385705DF6E35.png" xlink:type="simple" xlink:show="embed" xlink:actuate="onLoad">
            <text:p/>
          </draw:image>
        </draw:frame>
        <presentation:notes draw:style-name="dp2">
          <draw:page-thumbnail draw:name="Google Shape;57;g33db28f663_0_5:notes" draw:style-name="gr1" draw:layer="layout" svg:width="16.932cm" svg:height="9.524cm" svg:x="1.059cm" svg:y="1.905cm" draw:page-number="2" presentation:class="page"/>
          <draw:frame draw:name="Google Shape;58;g33db28f663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 et principe&#10;" draw:style-name="dp1" draw:master-page-name="TITLE_5f_AND_5f_BODY" presentation:presentation-page-layout-name="AL2T1">
        <draw:frame draw:name="Google Shape;67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otivation et principe</text:span><text:span text:style-name="T4"><text:line-break/></text:span><text:span text:style-name="T4"/></text:p>
          </draw:text-box>
        </draw:frame>
        <draw:frame draw:name="Google Shape;68;p1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5">2e étape :</text:span><text:span text:style-name="T6"> construction (“assemblage”) et résolution du problème matriciel </text:span></text:p>
            <text:p text:style-name="P12"><text:span text:style-name="T6">→ </text:span><text:span text:style-name="T6">solution approchée de l’EDP.</text:span></text:p>
            <text:p text:style-name="P8"><text:span text:style-name="T5"/></text:p>
            <text:p text:style-name="P8"><text:span text:style-name="T5">3e étape :</text:span><text:span text:style-name="T6"> visualisation de la solution </text:span></text:p>
            <text:p text:style-name="P8"><text:span text:style-name="T6">(“post-traitement”).</text:span></text:p>
            <text:p text:style-name="P8"><text:span text:style-name="T6"/></text:p>
            <text:p text:style-name="P8"><text:span text:style-name="T6"/></text:p>
            <text:p text:style-name="P9"><text:span text:style-name="T7"><text:a xlink:href="https://en.wikipedia.org/wiki/Finite_element_method" xlink:type="simple">https://en.wikipedia.org/wiki/Finite_element_method</text:a></text:span></text:p>
          </draw:text-box>
        </draw:frame>
        <draw:frame draw:name="Google Shape;69;p15" draw:style-name="gr2" draw:text-style-name="P11" draw:layer="layout" svg:width="6.616cm" svg:height="6.042cm" svg:x="16.708cm" svg:y="6.38cm">
          <draw:image xlink:href="Pictures/100002010000012C00000112B76350759931D1ED.png" xlink:type="simple" xlink:show="embed" xlink:actuate="onLoad">
            <text:p/>
          </draw:image>
        </draw:frame>
        <presentation:notes draw:style-name="dp2">
          <draw:page-thumbnail draw:name="Google Shape;64;g33e1a84dce_0_0:notes" draw:style-name="gr1" draw:layer="layout" svg:width="16.932cm" svg:height="9.524cm" svg:x="1.059cm" svg:y="1.905cm" draw:page-number="3" presentation:class="page"/>
          <draw:frame draw:name="Google Shape;65;g33e1a84dce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 et principe" draw:style-name="dp1" draw:master-page-name="TITLE_5f_AND_5f_BODY" presentation:presentation-page-layout-name="AL2T1">
        <draw:frame draw:name="Google Shape;74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otivation et principe</text:span></text:p>
          </draw:text-box>
        </draw:frame>
        <draw:frame draw:name="Google Shape;75;p1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Applications dans beaucoup de domaines industriels : aéronautique, aérospatial, automobile, énergie, matériaux, nucléaire, génie civil, santé, etc.</text:span></text:p>
            <text:p text:style-name="P8"><text:span text:style-name="T5">Liens avec les cours précédents : </text:span></text:p>
            <text:list text:style-name="L5">
              <text:list-item>
                <text:p text:style-name="P8"><text:span text:style-name="T6">Analyse Numérique (L3) : systèmes linéaires.</text:span></text:p>
              </text:list-item>
              <text:list-item>
                <text:p text:style-name="P7"><text:span text:style-name="T6">Calcul Scientifique 1 (M1) : résolution d’EDO.</text:span></text:p>
              </text:list-item>
              <text:list-item>
                <text:p text:style-name="P7"><text:span text:style-name="T6">Optimisation (M1/M2) : minimisation d’une fonction d’ “énergie”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name="Google Shape;71;g5f3bbda685_0_20:notes" draw:style-name="gr1" draw:layer="layout" svg:width="16.932cm" svg:height="9.524cm" svg:x="1.059cm" svg:y="1.905cm" draw:page-number="4" presentation:class="page"/>
          <draw:frame draw:name="Google Shape;72;g5f3bbda685_0_2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lques applications" draw:style-name="dp1" draw:master-page-name="TITLE_5f_AND_5f_BODY" presentation:presentation-page-layout-name="AL2T1">
        <draw:frame draw:name="Google Shape;80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Quelques applications</text:span></text:p>
          </draw:text-box>
        </draw:frame>
        <draw:frame draw:name="Google Shape;81;p1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5">1er exemple : écoulement du sang dans un anévrisme.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6">Problème d’interaction fluide-structure (Navier-Stokes + élasticité)</text:span></text:p>
            <text:p text:style-name="P8"><text:span text:style-name="T6">Thèse de Matteo Astorino. </text:span><text:span text:style-name="T8">SIAM J. Sci. Comput., 2009. </text:span></text:p>
            <text:p text:style-name="P8"><text:span text:style-name="T6">Librairie éléments finis LifeV </text:span><text:span text:style-name="T9">(</text:span><text:span text:style-name="T10"><text:a xlink:href="https://bitbucket.org/lifev-dev/lifev-release/wiki/Home" xlink:type="simple">https://bitbucket.org/lifev-dev/lifev-release/wiki/Home</text:a></text:span><text:span text:style-name="T9">)</text:span></text:p>
            <text:p text:style-name="P9"><text:span text:style-name="T9"/></text:p>
          </draw:text-box>
        </draw:frame>
        <draw:frame draw:name="Google Shape;82;p17" draw:style-name="gr2" draw:text-style-name="P11" draw:layer="layout" svg:width="8.264cm" svg:height="4.631cm" svg:x="3.07cm" svg:y="4.53cm">
          <draw:image xlink:href="Pictures/10000201000007FB000004796B62CE8AC33FF88E.png" xlink:type="simple" xlink:show="embed" xlink:actuate="onLoad">
            <text:p/>
          </draw:image>
        </draw:frame>
        <draw:frame draw:name="Google Shape;83;p17" draw:style-name="gr2" draw:text-style-name="P11" draw:layer="layout" svg:width="7.243cm" svg:height="4.534cm" svg:x="13.533cm" svg:y="4.518cm">
          <draw:image xlink:href="Pictures/10000201000007CD000004E2FF49BF1E6093BA52.png" xlink:type="simple" xlink:show="embed" xlink:actuate="onLoad">
            <text:p/>
          </draw:image>
        </draw:frame>
        <presentation:notes draw:style-name="dp2">
          <draw:page-thumbnail draw:name="Google Shape;77;g5f3bbda685_0_5:notes" draw:style-name="gr1" draw:layer="layout" svg:width="16.932cm" svg:height="9.524cm" svg:x="1.059cm" svg:y="1.905cm" draw:page-number="5" presentation:class="page"/>
          <draw:frame draw:name="Google Shape;78;g5f3bbda685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lques applications" draw:style-name="dp1" draw:master-page-name="TITLE_5f_AND_5f_BODY" presentation:presentation-page-layout-name="AL2T1">
        <draw:frame draw:name="Google Shape;88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Quelques applications</text:span></text:p>
          </draw:text-box>
        </draw:frame>
        <draw:frame draw:name="Google Shape;89;p1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5">2e exemple : impact et rebond d’une balle élastique.</text:span></text:p>
            <text:p text:style-name="P8"><text:span text:style-name="T5"/></text:p>
            <text:p text:style-name="P8"><text:span text:style-name="T6"/></text:p>
            <text:p text:style-name="P8"><text:span text:style-name="T6"/></text:p>
            <text:p text:style-name="P8"><text:span text:style-name="T6">Contact : inéquation variationnelle, inclusion différentielle.</text:span></text:p>
            <text:p text:style-name="P8"><text:span text:style-name="T6">Chouly &amp; Renard. </text:span><text:span text:style-name="T8">Adv.</text:span><text:span text:style-name="T6"> </text:span><text:span text:style-name="T8">Model. and Simul. in Eng. Sci., 2018.</text:span><text:span text:style-name="T6"> </text:span></text:p>
            <text:p text:style-name="P8"><text:span text:style-name="T6">Librairie éléments finis GetFEM++. </text:span><text:span text:style-name="T11"><text:a xlink:href="http://getfem.org/screenshots/shots.html" xlink:type="simple">http://getfem.org/screenshots/shots.html</text:a></text:span></text:p>
            <text:p text:style-name="P9"><text:span text:style-name="T12"/></text:p>
          </draw:text-box>
        </draw:frame>
        <draw:frame draw:name="Google Shape;90;p18" draw:style-name="gr2" draw:text-style-name="P11" draw:layer="layout" svg:width="5.207cm" svg:height="4.759cm" svg:x="7.229cm" svg:y="4.35cm">
          <draw:image xlink:href="Pictures/10000000000002E9000002A935DA809BA94CC1E9.jpg" xlink:type="simple" xlink:show="embed" xlink:actuate="onLoad">
            <text:p/>
          </draw:image>
        </draw:frame>
        <draw:frame draw:name="Google Shape;91;p18" draw:style-name="gr2" draw:text-style-name="P11" draw:layer="layout" svg:width="5.367cm" svg:height="4.899cm" svg:x="12.882cm" svg:y="4.35cm">
          <draw:image xlink:href="Pictures/10000000000002E9000002A855B960FE9CF5928A.jpg" xlink:type="simple" xlink:show="embed" xlink:actuate="onLoad">
            <text:p/>
          </draw:image>
        </draw:frame>
        <presentation:notes draw:style-name="dp2">
          <draw:page-thumbnail draw:name="Google Shape;85;g6052f349e6_0_10:notes" draw:style-name="gr1" draw:layer="layout" svg:width="16.932cm" svg:height="9.524cm" svg:x="1.059cm" svg:y="1.905cm" draw:page-number="6" presentation:class="page"/>
          <draw:frame draw:name="Google Shape;86;g6052f349e6_0_1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lques applications" draw:style-name="dp1" draw:master-page-name="TITLE_5f_AND_5f_BODY" presentation:presentation-page-layout-name="AL2T1">
        <draw:frame draw:name="Google Shape;96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Quelques applications</text:span></text:p>
          </draw:text-box>
        </draw:frame>
        <draw:frame draw:name="Google Shape;97;p1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5">3e exemple : effet d’une pression au niveau du talon.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Problème d’élasticité + adaptation de maillage.</text:span></text:p>
            <text:p text:style-name="P8"><text:span text:style-name="T6">Post-doc d’Huu Phuoc Bui. </text:span><text:span text:style-name="T8">Colloque Defi Infiniti (IHP). 2018.</text:span><text:span text:style-name="T6"> </text:span></text:p>
            <text:p text:style-name="P8"><text:span text:style-name="T6">Librairies éléments finis GetFEM++ / FEniCS. </text:span><text:span text:style-name="T11"><text:a xlink:href="https://fenicsproject.org/" xlink:type="simple">https://fenicsproject.org/</text:a></text:span></text:p>
            <text:p text:style-name="P9"><text:span text:style-name="T12"/></text:p>
          </draw:text-box>
        </draw:frame>
        <draw:frame draw:name="Google Shape;98;p19" draw:style-name="gr2" draw:text-style-name="P11" draw:layer="layout" svg:width="3.389cm" svg:height="4.775cm" svg:x="5.169cm" svg:y="4.364cm">
          <draw:image xlink:href="Pictures/10000000000001F3000002BF5F86BFDF674001EC.png" xlink:type="simple" xlink:show="embed" xlink:actuate="onLoad">
            <text:p/>
          </draw:image>
        </draw:frame>
        <draw:frame draw:name="Google Shape;99;p19" draw:style-name="gr2" draw:text-style-name="P11" draw:layer="layout" svg:width="4.179cm" svg:height="4.775cm" svg:x="9.547cm" svg:y="4.329cm">
          <draw:image xlink:href="Pictures/100000000000020000000249F218DB083C79103D.png" xlink:type="simple" xlink:show="embed" xlink:actuate="onLoad">
            <text:p/>
          </draw:image>
        </draw:frame>
        <draw:frame draw:name="Google Shape;100;p19" draw:style-name="gr2" draw:text-style-name="P11" draw:layer="layout" svg:width="4.045cm" svg:height="4.637cm" svg:x="15.022cm" svg:y="4.502cm">
          <draw:image xlink:href="Pictures/10000000000002000000024B9B7745F4B8E53DD8.png" xlink:type="simple" xlink:show="embed" xlink:actuate="onLoad">
            <text:p/>
          </draw:image>
        </draw:frame>
        <presentation:notes draw:style-name="dp2">
          <draw:page-thumbnail draw:name="Google Shape;93;g6052f349e6_0_15:notes" draw:style-name="gr1" draw:layer="layout" svg:width="16.932cm" svg:height="9.524cm" svg:x="1.059cm" svg:y="1.905cm" draw:page-number="7" presentation:class="page"/>
          <draw:frame draw:name="Google Shape;94;g6052f349e6_0_1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lques repères historiques&#10;&#10;&#10;" draw:style-name="dp1" draw:master-page-name="TITLE_5f_AND_5f_BODY" presentation:presentation-page-layout-name="AL2T1">
        <draw:frame draw:name="Google Shape;105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Quelques repères historiques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draw:frame draw:name="Google Shape;106;p20" presentation:style-name="pr5" draw:text-style-name="P10" draw:layer="layout" svg:width="23.667cm" svg:height="9.489cm" svg:x="0.866cm" svg:y="3.972cm" presentation:class="outline" presentation:user-transformed="true">
          <draw:text-box>
            <text:list text:style-name="L7">
              <text:list-item>
                <text:p text:style-name="P13"><text:span text:style-name="T6">Travaux précurseurs, en mathématiques et en mécanique :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12">Ritz (1908), Galerkine (1915),</text:span></text:p>
                  </text:list-item>
                  <text:list-item>
                    <text:p text:style-name="P13"><text:span text:style-name="T12">Schellbach (1851), Courant (1943),</text:span></text:p>
                  </text:list-item>
                  <text:list-item>
                    <text:p text:style-name="P13"><text:span text:style-name="T12">Kron (1939), Hrennikov (1941), McHenry (1943), Levy (1953). </text:span></text:p>
                  </text:list-item>
                </text:list>
              </text:list-item>
              <text:list-item>
                <text:p text:style-name="P13"><text:span text:style-name="T6">Début de la méthode (en aéronautique) et essor industriel :</text:span></text:p>
                <text:list>
                  <text:list-item>
                    <text:p text:style-name="P13"><text:span text:style-name="T12">Argyris (1954), Turner, Clough, Martin et Topp (1956)</text:span></text:p>
                  </text:list-item>
                  <text:list-item>
                    <text:p text:style-name="P13"><text:span text:style-name="T12">Zienkiewicz &amp; Chang (1967), Irons (1966 - 1970)</text:span></text:p>
                  </text:list-item>
                </text:list>
              </text:list-item>
              <text:list-item>
                <text:p text:style-name="P13"><text:span text:style-name="T6">Développement de la base mathématique :</text:span></text:p>
                <text:list>
                  <text:list-item>
                    <text:p text:style-name="P13"><text:span text:style-name="T12">Kang (1965), Zlamal (1968), Ciarlet (1968)</text:span></text:p>
                  </text:list-item>
                  <text:list-item>
                    <text:p text:style-name="P13"><text:span text:style-name="T12">Babuska &amp; Aziz (1973), Strang &amp; Fix (1973)</text:span></text:p>
                  </text:list-item>
                  <text:list-item>
                    <text:p text:style-name="P13"><text:span text:style-name="T12">Bramble, Brezzi, Dupont, Falk, Nitsche, Raviart, Strang, Thomas (1970 - 1977)</text:span></text:p>
                  </text:list-item>
                </text:list>
              </text:list-item>
            </text:list>
            <text:p text:style-name="P8"><text:span text:style-name="T6">Source : J.T. Oden, Historical comments on finite elements.</text:span></text:p>
            <text:p text:style-name="P9"><text:span text:style-name="T6"/></text:p>
          </draw:text-box>
        </draw:frame>
        <presentation:notes draw:style-name="dp2">
          <draw:page-thumbnail draw:name="Google Shape;102;g5f3bbda685_0_10:notes" draw:style-name="gr1" draw:layer="layout" svg:width="16.932cm" svg:height="9.524cm" svg:x="1.059cm" svg:y="1.905cm" draw:page-number="8" presentation:class="page"/>
          <draw:frame draw:name="Google Shape;103;g5f3bbda685_0_1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s de calcul “modernes” (et open-source)" draw:style-name="dp1" draw:master-page-name="TITLE_5f_AND_5f_BODY" presentation:presentation-page-layout-name="AL2T1">
        <draw:frame draw:name="Google Shape;111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odes de calcul “modernes” (et open-source)</text:span></text:p>
          </draw:text-box>
        </draw:frame>
        <draw:frame draw:name="Google Shape;112;p21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Code_Aster : </text:span><text:span text:style-name="T7"><text:a xlink:href="https://www.code-aster.org/spip.php?rubrique1" xlink:type="simple">https://www.code-aster.org/spip.php?rubrique1</text:a></text:span></text:p>
            <text:p text:style-name="P8"><text:span text:style-name="T6">Feel++ : </text:span><text:span text:style-name="T7"><text:a xlink:href="http://www.feelpp.org/" xlink:type="simple">http://www.feelpp.org/</text:a></text:span></text:p>
            <text:p text:style-name="P8"><text:span text:style-name="T6">FEniCS : </text:span><text:span text:style-name="T7"><text:a xlink:href="https://fenicsproject.org/" xlink:type="simple">https://fenicsproject.org/</text:a></text:span></text:p>
            <text:p text:style-name="P8"><text:span text:style-name="T6">FreeFEM : </text:span><text:span text:style-name="T7"><text:a xlink:href="https://freefem.org/" xlink:type="simple">https://freefem.org/</text:a></text:span></text:p>
            <text:p text:style-name="P8"><text:span text:style-name="T6">GetFEM++ : </text:span><text:span text:style-name="T7"><text:a xlink:href="http://getfem.org/" xlink:type="simple">http://getfem.org/</text:a></text:span></text:p>
            <text:p text:style-name="P8"><text:span text:style-name="T6">MEF++ : </text:span><text:span text:style-name="T7"><text:a xlink:href="https://giref.ulaval.ca/" xlink:type="simple">https://giref.ulaval.ca/</text:a></text:span></text:p>
            <text:p text:style-name="P9"><text:span text:style-name="T6"/></text:p>
          </draw:text-box>
        </draw:frame>
        <presentation:notes draw:style-name="dp2">
          <draw:page-thumbnail draw:name="Google Shape;108;g5f3bbda685_0_15:notes" draw:style-name="gr1" draw:layer="layout" svg:width="16.932cm" svg:height="9.524cm" svg:x="1.059cm" svg:y="1.905cm" draw:page-number="9" presentation:class="page"/>
          <draw:frame draw:name="Google Shape;109;g5f3bbda685_0_1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"/>
    <meta:generator>LibreOfficeDev/6.0.5.2$Linux_X86_64 LibreOffice_project/</meta:generator>
  </office:meta>
</office:document-meta>
</file>